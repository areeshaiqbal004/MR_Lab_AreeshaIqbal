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top="0in" fo:margin-bottom="0.0972in" style:contextual-spacing="false" fo:line-height="114%" fo:text-align="center" style:justify-single-word="false"/>
      <style:text-properties style:font-name="Google Sans" fo:font-size="18pt" style:font-size-asian="18pt" style:font-size-complex="18pt"/>
    </style:style>
    <style:style style:name="P2" style:family="paragraph" style:parent-style-name="Heading_20_2">
      <style:paragraph-properties fo:margin-top="0in" fo:margin-bottom="0.0972in" style:contextual-spacing="false" fo:line-height="114%"/>
      <style:text-properties style:font-name="Google Sans" fo:font-size="16pt" style:font-size-asian="16pt" style:font-size-complex="16pt"/>
    </style:style>
    <style:style style:name="P3" style:family="paragraph" style:parent-style-name="Heading_20_3">
      <style:paragraph-properties fo:margin-top="0in" fo:margin-bottom="0.0972in" style:contextual-spacing="false" fo:line-height="114%"/>
      <style:text-properties style:font-name="Google Sans" fo:font-size="16pt" style:font-size-asian="16pt" style:font-size-complex="16pt"/>
    </style:style>
    <style:style style:name="P4" style:family="paragraph" style:parent-style-name="Text_20_body">
      <style:paragraph-properties fo:margin-top="0in" fo:margin-bottom="0.0972in" style:contextual-spacing="false" fo:line-height="114%"/>
      <style:text-properties style:font-name="Google Sans Text"/>
    </style:style>
    <style:style style:name="P5" style:family="paragraph" style:parent-style-name="Text_20_body" style:list-style-name="L1">
      <style:paragraph-properties fo:margin-top="0in" fo:margin-bottom="0.0972in" style:contextual-spacing="false" fo:line-height="114%" fo:padding="0in" fo:border="none"/>
      <style:text-properties style:font-name="Google Sans Text"/>
    </style:style>
    <style:style style:name="P6" style:family="paragraph" style:parent-style-name="Text_20_body" style:list-style-name="L2">
      <style:paragraph-properties fo:margin-top="0in" fo:margin-bottom="0.0972in" style:contextual-spacing="false" fo:line-height="114%" fo:padding="0in" fo:border="none"/>
      <style:text-properties style:font-name="Google Sans Text"/>
    </style:style>
    <style:style style:name="P7" style:family="paragraph" style:parent-style-name="Text_20_body">
      <style:paragraph-properties fo:margin-top="0in" fo:margin-bottom="0.0972in" style:contextual-spacing="false" fo:line-height="114%"/>
    </style:style>
    <style:style style:name="T1" style:family="text">
      <style:text-properties fo:font-weight="bold"/>
    </style:style>
    <style:style style:name="T2" style:family="text">
      <style:text-properties style:font-name="Google Sans Text"/>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Lab Manual 7: Autonomous Navigation with Nav2</text:h>
      <text:p text:style-name="P4"><text:span text:style-name="T1">Name:</text:span> Areesha Iqbal</text:p>
      <text:p text:style-name="P4"><text:span text:style-name="T1">Roll Number:</text:span> 2022-MC-77</text:p>
      <text:h text:style-name="P2" text:outline-level="2">Objective</text:h>
      <text:p text:style-name="P4"><text:bookmark text:name="p-rc_78c2073d33b4ecbe-40"/>The objective of this lab is to implement autonomous navigation using the Nav2 stack, AMCL localization, and waypoint-based planning in a simulated ROS2 environment. </text:p>
      <text:h text:style-name="P2" text:outline-level="2">Procedure</text:h>
      <text:list xml:id="list816316545" text:style-name="L1">
        <text:list-item>
          <text:p text:style-name="P5"><text:bookmark text:name="p-rc_78c2073d33b4ecbe-41"/><text:span text:style-name="T1">Workspace Configuration:</text:span> Created the required folder structure and organized all necessary simulation packages and configuration files. </text:p>
        </text:list-item>
        <text:list-item>
          <text:p text:style-name="P5"><text:bookmark text:name="p-rc_78c2073d33b4ecbe-42"/><text:span text:style-name="T1">Simulation Initialization:</text:span> Launched the TurtleBot3 simulation platform inside the Gazebo environment. </text:p>
        </text:list-item>
        <text:list-item>
          <text:p text:style-name="P5"><text:bookmark text:name="p-rc_78c2073d33b4ecbe-43"/><text:span text:style-name="T1">Map Loading:</text:span> Loaded the saved 2D occupancy grid map using the Nav2 map server utilities. </text:p>
        </text:list-item>
        <text:list-item>
          <text:p text:style-name="P5"><text:bookmark text:name="p-rc_78c2073d33b4ecbe-44"/><text:span text:style-name="T1">Localization Setup:</text:span> Initialized and tuned the robot's real-time localization loop using the Adaptive Monte Carlo Localization (AMCL) node. </text:p>
        </text:list-item>
        <text:list-item>
          <text:p text:style-name="P5"><text:bookmark text:name="p-rc_78c2073d33b4ecbe-45"/><text:span text:style-name="T1">Manual Navigation Goals:</text:span> Dispatched single navigation goals interactively to the robot using the graphical tools available in RViz. </text:p>
        </text:list-item>
        <text:list-item>
          <text:p text:style-name="P5"><text:bookmark text:name="p-rc_78c2073d33b4ecbe-46"/><text:span text:style-name="T1">Programmatic Waypoint Planning:</text:span> Implemented a custom multi-waypoint navigation script using Python to coordinate complex paths. </text:p>
        </text:list-item>
        <text:list-item>
          <text:p text:style-name="P5"><text:bookmark text:name="p-rc_78c2073d33b4ecbe-47"/><text:span text:style-name="T1">Execution and Monitoring:</text:span> Executed the programmatic multi-waypoint node to observe continuous path navigation in simulation. </text:p>
        </text:list-item>
        <text:list-item>
          <text:p text:style-name="P5"><text:bookmark text:name="p-rc_78c2073d33b4ecbe-48"/><text:span text:style-name="T1">Dynamic Obstacle and Costmap Analysis:</text:span> Monitored local and global costmap updates and observed the robot's automated recovery behaviors. </text:p>
        </text:list-item>
      </text:list>
      <text:h text:style-name="P2" text:outline-level="2">Tasks Implementation &amp; Analysis</text:h>
      <text:h text:style-name="P3" text:outline-level="3">Task 1: Single Goal Navigation</text:h>
      <text:p text:style-name="P4"><text:bookmark text:name="p-rc_78c2073d33b4ecbe-49"/>Three independent navigation goals were selected and tested across the map. The Nav2 framework successfully calculated the optimal trajectories, allowing the robot to plan and execute paths accurately to reach each destination without collision. </text:p>
      <text:h text:style-name="P3" text:outline-level="3"><text:soft-page-break/>Task 2: Multi-Waypoint Navigation</text:h>
      <text:p text:style-name="P4"><text:bookmark text:name="p-rc_78c2073d33b4ecbe-50"/>A dedicated Python node was developed to handle automated mission routing. Instead of terminating the run after a single point, the node queued an array of targets, directing the robot to navigate through multiple sequential waypoints smoothly. </text:p>
      <text:h text:style-name="P3" text:outline-level="3">Task 3: Dynamic Waypoint Injection</text:h>
      <text:p text:style-name="P7"><text:bookmark text:name="p-rc_78c2073d33b4ecbe-51"/><text:span text:style-name="T2">To remove hardcoded coordinate limitations, the waypoint input system was upgraded to accept target coordinates as command-line inputs. By utilizing the </text:span><text:span text:style-name="Source_20_Text"><text:span text:style-name="T2">sys.argv</text:span></text:span><text:span text:style-name="T2"> module in the Python script, operators can dynamically inject navigation targets at runtime. </text:span></text:p>
      <text:h text:style-name="P3" text:outline-level="3">Task 4: Costmap Observation</text:h>
      <text:p text:style-name="P4"><text:bookmark text:name="p-rc_78c2073d33b4ecbe-52"/>The dual-costmap architecture of the navigation stack was actively monitored: </text:p>
      <text:list xml:id="list3320134595" text:style-name="L2">
        <text:list-item>
          <text:p text:style-name="P6"><text:bookmark text:name="p-rc_78c2073d33b4ecbe-53"/><text:span text:style-name="T1">Global Costmap:</text:span> Used to analyze the static features of the entire map to calculate long-range, macro-level planning trajectories. </text:p>
        </text:list-item>
        <text:list-item>
          <text:p text:style-name="P6"><text:bookmark text:name="p-rc_78c2073d33b4ecbe-54"/><text:span text:style-name="T1">Local Costmap:</text:span> Tracked real-time sensor streams to build a dynamic window around the robot, managing immediate obstacle avoidance and path adjustments. </text:p>
        </text:list-item>
      </text:list>
      <text:h text:style-name="P3" text:outline-level="3">Task 5: Recovery Behavior</text:h>
      <text:p text:style-name="P4"><text:bookmark text:name="p-rc_78c2073d33b4ecbe-55"/>To test system robustness, a sudden obstacle was spawned directly into the environment using Gazebo. Upon encountering the blocked path, the robot's navigation behavior tree triggered a recovery sequence, successfully replanning a secondary path to avoid the obstacle and complete its mission. </text:p>
      <text:h text:style-name="P2" text:outline-level="2">Conclusion</text:h>
      <text:p text:style-name="P4"><text:bookmark text:name="p-rc_78c2073d33b4ecbe-56"/>This laboratory session provided practical experience with the ROS2 navigation ecosystem. By successfully deploying the Nav2 stack, integrating AMCL localization, and scripting custom path-planning behavior, the core principles of autonomous mobile robot routing were demonstrated.</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27T21:33:37.494396341</meta:creation-date>
    <dc:date>2026-06-27T21:36:27.537199852</dc:date>
    <meta:editing-duration>PT2M53S</meta:editing-duration>
    <meta:editing-cycles>1</meta:editing-cycles>
    <meta:document-statistic meta:table-count="0" meta:image-count="0" meta:object-count="0" meta:page-count="2" meta:paragraph-count="29" meta:word-count="434" meta:character-count="3148" meta:non-whitespace-character-count="2737"/>
    <meta:generator>LibreOffice/7.3.7.2$Linux_X86_64 LibreOffice_project/30$Build-2</meta:generator>
  </office:meta>
</office:document-meta>
</file>